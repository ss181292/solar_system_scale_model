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C000000DC180FE3D1B16E2862.jpg" manifest:media-type="image/jpeg"/>
  <manifest:file-entry manifest:full-path="Pictures/10000000000000DC000000DCB7E235BFCC3BC2C1.jpg" manifest:media-type="image/jpeg"/>
  <manifest:file-entry manifest:full-path="Pictures/10000000000000DC000000DC42842D13C5CD5ED5.jpg" manifest:media-type="image/jpeg"/>
  <manifest:file-entry manifest:full-path="Pictures/10000000000000DC000000DCBF6BFADF79B2E563.jpg" manifest:media-type="image/jpeg"/>
  <manifest:file-entry manifest:full-path="Pictures/10000000000000DC000000DC78C7F4FA4D93B010.jpg" manifest:media-type="image/jpeg"/>
  <manifest:file-entry manifest:full-path="Pictures/10000000000000DC000000DC80623F22509162EA.jpg" manifest:media-type="image/jpeg"/>
  <manifest:file-entry manifest:full-path="Pictures/10000000000000DC000000DCAC26B00001C8392F.jpg" manifest:media-type="image/jpeg"/>
  <manifest:file-entry manifest:full-path="Pictures/10000000000000DC000000DC6BC8ADAE249CF942.jpg" manifest:media-type="image/jpeg"/>
  <manifest:file-entry manifest:full-path="Pictures/10000000000000DC000000DCFEE807307C1397E0.jpg" manifest:media-type="image/jpeg"/>
  <manifest:file-entry manifest:full-path="Pictures/10000000000000DC000000DC31061D89C8453365.jpg" manifest:media-type="image/jpeg"/>
  <manifest:file-entry manifest:full-path="Pictures/10000000000000DC000000DC42D137221B134F12.jpg" manifest:media-type="image/jpeg"/>
  <manifest:file-entry manifest:full-path="Pictures/10000000000000DC000000DCEA9BDBE2AF7E41F3.jpg" manifest:media-type="image/jpeg"/>
  <manifest:file-entry manifest:full-path="Pictures/10000000000000DC000000DCE408DB65CFA0C5C1.jpg" manifest:media-type="image/jpeg"/>
  <manifest:file-entry manifest:full-path="Pictures/10000000000000DC000000DC1004B9921664BAED.jpg" manifest:media-type="image/jpeg"/>
  <manifest:file-entry manifest:full-path="Pictures/10000000000000DC000000DCD7E23D39799DFDAD.jpg" manifest:media-type="image/jpeg"/>
  <manifest:file-entry manifest:full-path="Pictures/10000000000000DC000000DC3D5D6265C38DE8B6.jpg" manifest:media-type="image/jpeg"/>
  <manifest:file-entry manifest:full-path="Pictures/10000000000000DC000000DC2597A30F7CEC1078.jpg" manifest:media-type="image/jpeg"/>
  <manifest:file-entry manifest:full-path="Pictures/10000000000000DC000000DC49D3437A18EC1F6B.jpg" manifest:media-type="image/jpeg"/>
  <manifest:file-entry manifest:full-path="Pictures/10000000000000DC000000DCE532D45468C2342F.jpg" manifest:media-type="image/jpeg"/>
  <manifest:file-entry manifest:full-path="Pictures/10000000000000DC000000DCA345574702864CC3.jpg" manifest:media-type="image/jpeg"/>
  <manifest:file-entry manifest:full-path="Pictures/10000000000000DC000000DC6A2B1337E3D70623.jpg" manifest:media-type="image/jpeg"/>
  <manifest:file-entry manifest:full-path="Pictures/10000000000000DC000000DC92A31E5EDB38F8FC.jpg" manifest:media-type="image/jpeg"/>
  <manifest:file-entry manifest:full-path="Pictures/10000000000000DC000000DCF1B0F2C223FD8654.jpg" manifest:media-type="image/jpeg"/>
  <manifest:file-entry manifest:full-path="Pictures/10000000000000DC000000DC00C3D1792CC36ABD.jpg" manifest:media-type="image/jpeg"/>
  <manifest:file-entry manifest:full-path="Pictures/10000000000000DC000000DC4CFBD53C7914AB81.jpg" manifest:media-type="image/jpeg"/>
  <manifest:file-entry manifest:full-path="Pictures/10000000000000DC000000DC4688BD7F250F258B.jpg" manifest:media-type="image/jpeg"/>
  <manifest:file-entry manifest:full-path="Pictures/10000000000000DC000000DC4F21A4D0B04F715C.jpg" manifest:media-type="image/jpeg"/>
  <manifest:file-entry manifest:full-path="Pictures/10000000000000DC000000DCCFEA3A22BA0DECD4.jpg" manifest:media-type="image/jpeg"/>
  <manifest:file-entry manifest:full-path="Pictures/10000000000000DC000000DC9AC1E00D598F83F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loext:padding-left="0cm" loext:padding-right="0cm" loext:padding-top="0cm" loext:padding-bottom="0.049cm" loext:border-left="none" loext:border-right="none" loext:border-top="none" loext:border-bottom="0.06pt solid #cccccc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33333" loext:opacity="100%" style:font-name="Manrope" fo:font-size="12pt" fo:letter-spacing="normal" fo:font-style="normal" fo:font-weight="bold" style:font-name-asian="Manrope" style:font-size-asian="12pt" style:font-style-asian="normal" style:font-weight-asian="bold" style:font-name-complex="Manrope" style:font-size-complex="12pt" style:font-style-complex="normal" style:font-weight-complex="bold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333333" loext:opacity="100%" style:font-name="Manrope" fo:font-size="12pt" fo:letter-spacing="normal" fo:font-style="normal" fo:font-weight="bold" style:font-name-asian="Manrope" style:font-size-asian="12pt" style:font-style-asian="normal" style:font-weight-asian="bold" style:font-name-complex="Manrope" style:font-size-complex="12pt" style:font-style-complex="normal" style:font-weight-complex="bold" loext:padding-left="0cm" loext:padding-right="0cm" loext:padding-top="0cm" loext:padding-bottom="0.049cm" loext:border-left="none" loext:border-right="none" loext:border-top="none" loext:border-bottom="0.06pt solid #cccccc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loext:opacity="100%" style:font-name="Manrope" fo:font-size="12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cccccc"/>
    </style:style>
    <style:style style:name="P5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loext:opacity="100%" style:font-name="Manrope" fo:font-size="9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cccccc"/>
    </style:style>
    <style:style style:name="P6" style:family="paragraph" style:parent-style-name="Standard">
      <style:paragraph-properties fo:text-align="center" style:justify-single-word="false" fo:orphans="2" fo:widows="2"/>
      <style:text-properties fo:color="#000000" loext:opacity="100%" fo:font-weight="normal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999999" loext:opacity="100%" style:text-line-through-style="solid" style:text-line-through-type="single"/>
    </style:style>
    <style:style style:name="T1" style:family="text">
      <style:text-properties fo:font-weight="normal"/>
    </style:style>
    <style:style style:name="T2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-left="0.049cm" fo:padding-right="0cm" fo:padding-top="0.049cm" fo:padding-bottom="0.049cm" fo:border-left="1.5pt solid #eeeeee" fo:border-right="none" fo:border-top="1.5pt solid #eeeeee" fo:border-bottom="1.5pt solid #eeeee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as-char" svg:width="5.821cm" svg:height="5.821cm" draw:z-index="28"><draw:image xlink:href="Pictures/10000000000000DC000000DCB7E235BFCC3BC2C1.jpg" xlink:type="simple" xlink:show="embed" xlink:actuate="onLoad" draw:mime-type="image/jpeg"/><svg:title>Ship to USA / PETG White</svg:title></draw:frame></text:p>
      <text:section text:style-name="Sect1" text:name="multivariants_0_block_option_0_0_0">
        <text:p text:style-name="P4">PETG White</text:p>
        <text:section text:style-name="Sect1" text:name="multivariants_0_block_qtyh_0_0_0">
          <text:p text:style-name="P6">Quantity</text:p>
          <text:section text:style-name="Sect1" text:name="multivariants_0_block_qty_left_0_0_0">
            <text:p text:style-name="P7"/>
          </text:section>
          <text:section text:style-name="Sect1" text:name="multivariants_0_block_qty_right_0_0_0">
            <text:p text:style-name="P7"/>
          </text:section>
          <text:p text:style-name="P5">1413 In stock</text:p>
        </text:section>
        <text:section text:style-name="Sect1" text:name="multivariants_0_block_prch_0_0_0">
          <text:p text:style-name="P3">Price</text:p>
          <text:section text:style-name="Sect1" text:name="multivariants_0_block_prc_compare_0_0_0">
            <text:p text:style-name="P8">€<text:span text:style-name="T1">16,99 EUR</text:span></text:p>
          </text:section>
          <text:section text:style-name="Sect1" text:name="multivariants_0_block_prc_unit_0_0_0">
            <text:p text:style-name="P2">€10,99 EUR</text:p>
          </text:section>
        </text:section>
      </text:section>
      <text:section text:style-name="Sect1" text:name="multivariants_0_block_option_0_0_1">
        <text:p text:style-name="P1"><draw:frame draw:style-name="fr1" draw:name="Obraz2" text:anchor-type="as-char" svg:width="5.821cm" svg:height="5.821cm" draw:z-index="0"><draw:image xlink:href="Pictures/10000000000000DC000000DC42842D13C5CD5ED5.jpg" xlink:type="simple" xlink:show="embed" xlink:actuate="onLoad" draw:mime-type="image/jpeg"/><svg:title>Ship to USA / PETG Black</svg:title></draw:frame></text:p>
        <text:p text:style-name="P4">PETG Black</text:p>
        <text:section text:style-name="Sect1" text:name="multivariants_0_block_qtyh_0_0_1">
          <text:p text:style-name="P6">Quantity</text:p>
          <text:section text:style-name="Sect1" text:name="multivariants_0_block_qty_left_0_0_1">
            <text:p text:style-name="P7"/>
          </text:section>
          <text:section text:style-name="Sect1" text:name="multivariants_0_block_qty_right_0_0_1">
            <text:p text:style-name="P7"/>
          </text:section>
          <text:p text:style-name="P5">1233 In stock</text:p>
        </text:section>
        <text:section text:style-name="Sect1" text:name="multivariants_0_block_prch_0_0_1">
          <text:p text:style-name="P3">Price</text:p>
          <text:section text:style-name="Sect1" text:name="multivariants_0_block_prc_compare_0_0_1">
            <text:p text:style-name="P8">€<text:span text:style-name="T1">16,99 EUR</text:span></text:p>
          </text:section>
          <text:section text:style-name="Sect1" text:name="multivariants_0_block_prc_unit_0_0_1">
            <text:p text:style-name="P2">€10,99 EUR</text:p>
          </text:section>
        </text:section>
      </text:section>
      <text:section text:style-name="Sect1" text:name="multivariants_0_block_option_0_0_2">
        <text:p text:style-name="P1"><draw:frame draw:style-name="fr1" draw:name="Obraz3" text:anchor-type="as-char" svg:width="5.821cm" svg:height="5.821cm" draw:z-index="1"><draw:image xlink:href="Pictures/10000000000000DC000000DCBF6BFADF79B2E563.jpg" xlink:type="simple" xlink:show="embed" xlink:actuate="onLoad" draw:mime-type="image/jpeg"/><svg:title>Ship to USA / PETG Grey</svg:title></draw:frame></text:p>
        <text:p text:style-name="P4"><text:soft-page-break/>PETG Grey</text:p>
        <text:section text:style-name="Sect1" text:name="multivariants_0_block_qtyh_0_0_2">
          <text:p text:style-name="P6">Quantity</text:p>
          <text:section text:style-name="Sect1" text:name="multivariants_0_block_qty_left_0_0_2">
            <text:p text:style-name="P7"/>
          </text:section>
          <text:section text:style-name="Sect1" text:name="multivariants_0_block_qty_right_0_0_2">
            <text:p text:style-name="P7"/>
          </text:section>
          <text:p text:style-name="P5">294 In stock</text:p>
        </text:section>
        <text:section text:style-name="Sect1" text:name="multivariants_0_block_prch_0_0_2">
          <text:p text:style-name="P3">Price</text:p>
          <text:section text:style-name="Sect1" text:name="multivariants_0_block_prc_compare_0_0_2">
            <text:p text:style-name="P8">€<text:span text:style-name="T1">16,99 EUR</text:span></text:p>
          </text:section>
          <text:section text:style-name="Sect1" text:name="multivariants_0_block_prc_unit_0_0_2">
            <text:p text:style-name="P2">€11,99 EUR</text:p>
          </text:section>
        </text:section>
      </text:section>
      <text:section text:style-name="Sect1" text:name="multivariants_0_block_option_0_0_3">
        <text:p text:style-name="P1"><draw:frame draw:style-name="fr1" draw:name="Obraz4" text:anchor-type="as-char" svg:width="5.821cm" svg:height="5.821cm" draw:z-index="2"><draw:image xlink:href="Pictures/10000000000000DC000000DC78C7F4FA4D93B010.jpg" xlink:type="simple" xlink:show="embed" xlink:actuate="onLoad" draw:mime-type="image/jpeg"/><svg:title>Ship to USA / PETG Red</svg:title></draw:frame></text:p>
        <text:p text:style-name="P4">PETG Red</text:p>
        <text:section text:style-name="Sect1" text:name="multivariants_0_block_qtyh_0_0_3">
          <text:p text:style-name="P6">Quantity</text:p>
          <text:section text:style-name="Sect1" text:name="multivariants_0_block_qty_left_0_0_3">
            <text:p text:style-name="P7"/>
          </text:section>
          <text:section text:style-name="Sect1" text:name="multivariants_0_block_qty_right_0_0_3">
            <text:p text:style-name="P7"/>
          </text:section>
          <text:p text:style-name="P5">163 In stock</text:p>
        </text:section>
        <text:section text:style-name="Sect1" text:name="multivariants_0_block_prch_0_0_3">
          <text:p text:style-name="P3">Price</text:p>
          <text:section text:style-name="Sect1" text:name="multivariants_0_block_prc_compare_0_0_3">
            <text:p text:style-name="P8">€<text:span text:style-name="T1">16,99 EUR</text:span></text:p>
          </text:section>
          <text:section text:style-name="Sect1" text:name="multivariants_0_block_prc_unit_0_0_3">
            <text:p text:style-name="P2">€12,99 EUR</text:p>
          </text:section>
        </text:section>
      </text:section>
      <text:section text:style-name="Sect1" text:name="multivariants_0_block_option_0_0_4">
        <text:p text:style-name="P1"><draw:frame draw:style-name="fr1" draw:name="Obraz5" text:anchor-type="as-char" svg:width="5.821cm" svg:height="5.821cm" draw:z-index="3"><draw:image xlink:href="Pictures/10000000000000DC000000DCAC26B00001C8392F.jpg" xlink:type="simple" xlink:show="embed" xlink:actuate="onLoad" draw:mime-type="image/jpeg"/><svg:title>Ship to USA / PETG Blue(Klein Blue)</svg:title></draw:frame></text:p>
        <text:p text:style-name="P4">PETG Blue(Klein Blue)</text:p>
        <text:section text:style-name="Sect1" text:name="multivariants_0_block_qtyh_0_0_4">
          <text:p text:style-name="P6">Quantity</text:p>
          <text:section text:style-name="Sect1" text:name="multivariants_0_block_qty_left_0_0_4">
            <text:p text:style-name="P7"/>
          </text:section>
          <text:section text:style-name="Sect1" text:name="multivariants_0_block_qty_right_0_0_4">
            <text:p text:style-name="P7"/>
          </text:section>
          <text:p text:style-name="P5">161 In stock</text:p>
        </text:section>
        <text:section text:style-name="Sect1" text:name="multivariants_0_block_prch_0_0_4">
          <text:p text:style-name="P3">Price</text:p>
          <text:section text:style-name="Sect1" text:name="multivariants_0_block_prc_compare_0_0_4">
            <text:p text:style-name="P8">€<text:span text:style-name="T1">16,99 EUR</text:span></text:p>
          </text:section>
          <text:section text:style-name="Sect1" text:name="multivariants_0_block_prc_unit_0_0_4">
            <text:p text:style-name="P2">€12,99 EUR</text:p>
          </text:section>
        </text:section>
      </text:section>
      <text:section text:style-name="Sect1" text:name="multivariants_0_block_option_0_0_5">
        <text:p text:style-name="P1"><text:soft-page-break/><draw:frame draw:style-name="fr1" draw:name="Obraz6" text:anchor-type="as-char" svg:width="5.821cm" svg:height="5.821cm" draw:z-index="4"><draw:image xlink:href="Pictures/10000000000000DC000000DC42D137221B134F12.jpg" xlink:type="simple" xlink:show="embed" xlink:actuate="onLoad" draw:mime-type="image/jpeg"/><svg:title>Ship to USA / PETG Green</svg:title></draw:frame></text:p>
        <text:p text:style-name="P4">PETG Green</text:p>
        <text:section text:style-name="Sect1" text:name="multivariants_0_block_qtyh_0_0_5">
          <text:p text:style-name="P6">Quantity</text:p>
          <text:section text:style-name="Sect1" text:name="multivariants_0_block_qty_left_0_0_5">
            <text:p text:style-name="P7"/>
          </text:section>
          <text:section text:style-name="Sect1" text:name="multivariants_0_block_qty_right_0_0_5">
            <text:p text:style-name="P7"/>
          </text:section>
          <text:p text:style-name="P5">151 In stock</text:p>
        </text:section>
        <text:section text:style-name="Sect1" text:name="multivariants_0_block_prch_0_0_5">
          <text:p text:style-name="P3">Price</text:p>
          <text:section text:style-name="Sect1" text:name="multivariants_0_block_prc_compare_0_0_5">
            <text:p text:style-name="P8">€<text:span text:style-name="T1">16,99 EUR</text:span></text:p>
          </text:section>
          <text:section text:style-name="Sect1" text:name="multivariants_0_block_prc_unit_0_0_5">
            <text:p text:style-name="P2">€12,99 EUR</text:p>
          </text:section>
        </text:section>
      </text:section>
      <text:section text:style-name="Sect1" text:name="multivariants_0_block_option_0_0_6">
        <text:p text:style-name="P1"><draw:frame draw:style-name="fr1" draw:name="Obraz7" text:anchor-type="as-char" svg:width="5.821cm" svg:height="5.821cm" draw:z-index="5"><draw:image xlink:href="Pictures/10000000000000DC000000DC6BC8ADAE249CF942.jpg" xlink:type="simple" xlink:show="embed" xlink:actuate="onLoad" draw:mime-type="image/jpeg"/><svg:title>Ship to USA / PETG Clear(Transparent)</svg:title></draw:frame></text:p>
        <text:p text:style-name="P4">PETG Clear(Transparent)</text:p>
        <text:section text:style-name="Sect1" text:name="multivariants_0_block_qtyh_0_0_6">
          <text:p text:style-name="P6">Quantity</text:p>
          <text:section text:style-name="Sect1" text:name="multivariants_0_block_qty_left_0_0_6">
            <text:p text:style-name="P7"/>
          </text:section>
          <text:section text:style-name="Sect1" text:name="multivariants_0_block_qty_right_0_0_6">
            <text:p text:style-name="P7"/>
          </text:section>
          <text:p text:style-name="P5">358 In stock</text:p>
        </text:section>
        <text:section text:style-name="Sect1" text:name="multivariants_0_block_prch_0_0_6">
          <text:p text:style-name="P3">Price</text:p>
          <text:section text:style-name="Sect1" text:name="multivariants_0_block_prc_compare_0_0_6">
            <text:p text:style-name="P8">€<text:span text:style-name="T1">16,99 EUR</text:span></text:p>
          </text:section>
          <text:section text:style-name="Sect1" text:name="multivariants_0_block_prc_unit_0_0_6">
            <text:p text:style-name="P2">€11,99 EUR</text:p>
          </text:section>
        </text:section>
      </text:section>
      <text:section text:style-name="Sect1" text:name="multivariants_0_block_option_0_0_8">
        <text:p text:style-name="P1"><draw:frame draw:style-name="fr1" draw:name="Obraz8" text:anchor-type="as-char" svg:width="5.821cm" svg:height="5.821cm" draw:z-index="6"><draw:image xlink:href="Pictures/10000000000000DC000000DCEA9BDBE2AF7E41F3.jpg" xlink:type="simple" xlink:show="embed" xlink:actuate="onLoad" draw:mime-type="image/jpeg"/><svg:title>Ship to USA / PETG Ceramic White</svg:title></draw:frame></text:p>
        <text:p text:style-name="P4"><text:soft-page-break/>PETG Ceramic White</text:p>
        <text:section text:style-name="Sect1" text:name="multivariants_0_block_qtyh_0_0_8">
          <text:p text:style-name="P6">Quantity</text:p>
          <text:section text:style-name="Sect1" text:name="multivariants_0_block_qty_left_0_0_8">
            <text:p text:style-name="P7"/>
          </text:section>
          <text:section text:style-name="Sect1" text:name="multivariants_0_block_qty_right_0_0_8">
            <text:p text:style-name="P7"/>
          </text:section>
          <text:p text:style-name="P5">297 In stock</text:p>
        </text:section>
        <text:section text:style-name="Sect1" text:name="multivariants_0_block_prch_0_0_8">
          <text:p text:style-name="P3">Price</text:p>
          <text:section text:style-name="Sect1" text:name="multivariants_0_block_prc_compare_0_0_8">
            <text:p text:style-name="P8">€<text:span text:style-name="T1">16,99 EUR</text:span></text:p>
          </text:section>
          <text:section text:style-name="Sect1" text:name="multivariants_0_block_prc_unit_0_0_8">
            <text:p text:style-name="P2">€12,99 EUR</text:p>
          </text:section>
        </text:section>
      </text:section>
      <text:section text:style-name="Sect1" text:name="multivariants_0_block_option_0_0_9">
        <text:p text:style-name="P1"><draw:frame draw:style-name="fr1" draw:name="Obraz9" text:anchor-type="as-char" svg:width="5.821cm" svg:height="5.821cm" draw:z-index="7"><draw:image xlink:href="Pictures/10000000000000DC000000DC31061D89C8453365.jpg" xlink:type="simple" xlink:show="embed" xlink:actuate="onLoad" draw:mime-type="image/jpeg"/><svg:title>Ship to USA / PETG Bone White</svg:title></draw:frame></text:p>
        <text:p text:style-name="P4">PETG Bone White</text:p>
        <text:section text:style-name="Sect1" text:name="multivariants_0_block_qtyh_0_0_9">
          <text:p text:style-name="P6">Quantity</text:p>
          <text:section text:style-name="Sect1" text:name="multivariants_0_block_qty_left_0_0_9">
            <text:p text:style-name="P7"/>
          </text:section>
          <text:section text:style-name="Sect1" text:name="multivariants_0_block_qty_right_0_0_9">
            <text:p text:style-name="P7"/>
          </text:section>
          <text:p text:style-name="P5">230 In stock</text:p>
        </text:section>
        <text:section text:style-name="Sect1" text:name="multivariants_0_block_prch_0_0_9">
          <text:p text:style-name="P3">Price</text:p>
          <text:section text:style-name="Sect1" text:name="multivariants_0_block_prc_compare_0_0_9">
            <text:p text:style-name="P8">€<text:span text:style-name="T1">16,99 EUR</text:span></text:p>
          </text:section>
          <text:section text:style-name="Sect1" text:name="multivariants_0_block_prc_unit_0_0_9">
            <text:p text:style-name="P2">€12,99 EUR</text:p>
          </text:section>
        </text:section>
      </text:section>
      <text:section text:style-name="Sect1" text:name="multivariants_0_block_option_0_0_10">
        <text:p text:style-name="P1"><draw:frame draw:style-name="fr1" draw:name="Obraz10" text:anchor-type="as-char" svg:width="5.821cm" svg:height="5.821cm" draw:z-index="8"><draw:image xlink:href="Pictures/10000000000000DC000000DCE408DB65CFA0C5C1.jpg" xlink:type="simple" xlink:show="embed" xlink:actuate="onLoad" draw:mime-type="image/jpeg"/><svg:title>Ship to USA / PETG Midnigh</svg:title></draw:frame></text:p>
        <text:p text:style-name="P4">PETG Midnigh</text:p>
        <text:section text:style-name="Sect1" text:name="multivariants_0_block_qtyh_0_0_10">
          <text:p text:style-name="P6">Quantity</text:p>
          <text:section text:style-name="Sect1" text:name="multivariants_0_block_qty_left_0_0_10">
            <text:p text:style-name="P7"/>
          </text:section>
          <text:section text:style-name="Sect1" text:name="multivariants_0_block_qty_right_0_0_10">
            <text:p text:style-name="P7"/>
          </text:section>
          <text:p text:style-name="P5">138 In stock</text:p>
        </text:section>
        <text:section text:style-name="Sect1" text:name="multivariants_0_block_prch_0_0_10">
          <text:p text:style-name="P3">Price</text:p>
          <text:section text:style-name="Sect1" text:name="multivariants_0_block_prc_compare_0_0_10">
            <text:p text:style-name="P8">€<text:span text:style-name="T1">16,99 EUR</text:span></text:p>
          </text:section>
          <text:section text:style-name="Sect1" text:name="multivariants_0_block_prc_unit_0_0_10">
            <text:p text:style-name="P2">€12,99 EUR</text:p>
          </text:section>
        </text:section>
      </text:section>
      <text:section text:style-name="Sect1" text:name="multivariants_0_block_option_0_0_11">
        <text:p text:style-name="P1"><text:soft-page-break/><draw:frame draw:style-name="fr1" draw:name="Obraz11" text:anchor-type="as-char" svg:width="5.821cm" svg:height="5.821cm" draw:z-index="9"><draw:image xlink:href="Pictures/10000000000000DC000000DC1004B9921664BAED.jpg" xlink:type="simple" xlink:show="embed" xlink:actuate="onLoad" draw:mime-type="image/jpeg"/><svg:title>Ship to USA / PETG Roasted Chestnut</svg:title></draw:frame></text:p>
        <text:p text:style-name="P4">PETG Roasted Chestnut</text:p>
        <text:section text:style-name="Sect1" text:name="multivariants_0_block_qtyh_0_0_11">
          <text:p text:style-name="P6">Quantity</text:p>
          <text:section text:style-name="Sect1" text:name="multivariants_0_block_qty_left_0_0_11">
            <text:p text:style-name="P7"/>
          </text:section>
          <text:section text:style-name="Sect1" text:name="multivariants_0_block_qty_right_0_0_11">
            <text:p text:style-name="P7"/>
          </text:section>
          <text:p text:style-name="P5">216 In stock</text:p>
        </text:section>
        <text:section text:style-name="Sect1" text:name="multivariants_0_block_prch_0_0_11">
          <text:p text:style-name="P3">Price</text:p>
          <text:section text:style-name="Sect1" text:name="multivariants_0_block_prc_compare_0_0_11">
            <text:p text:style-name="P8">€<text:span text:style-name="T1">16,99 EUR</text:span></text:p>
          </text:section>
          <text:section text:style-name="Sect1" text:name="multivariants_0_block_prc_unit_0_0_11">
            <text:p text:style-name="P2">€12,99 EUR</text:p>
          </text:section>
        </text:section>
      </text:section>
      <text:section text:style-name="Sect1" text:name="multivariants_0_block_option_0_0_12">
        <text:p text:style-name="P1"><draw:frame draw:style-name="fr1" draw:name="Obraz12" text:anchor-type="as-char" svg:width="5.821cm" svg:height="5.821cm" draw:z-index="10"><draw:image xlink:href="Pictures/10000000000000DC000000DCD7E23D39799DFDAD.jpg" xlink:type="simple" xlink:show="embed" xlink:actuate="onLoad" draw:mime-type="image/jpeg"/><svg:title>Ship to USA / PETG Coffee Brown</svg:title></draw:frame></text:p>
        <text:p text:style-name="P4">PETG Coffee Brown</text:p>
        <text:section text:style-name="Sect1" text:name="multivariants_0_block_qtyh_0_0_12">
          <text:p text:style-name="P6">Quantity</text:p>
          <text:section text:style-name="Sect1" text:name="multivariants_0_block_qty_left_0_0_12">
            <text:p text:style-name="P7"/>
          </text:section>
          <text:section text:style-name="Sect1" text:name="multivariants_0_block_qty_right_0_0_12">
            <text:p text:style-name="P7"/>
          </text:section>
          <text:p text:style-name="P5">36 In stock</text:p>
        </text:section>
        <text:section text:style-name="Sect1" text:name="multivariants_0_block_prch_0_0_12">
          <text:p text:style-name="P3">Price</text:p>
          <text:section text:style-name="Sect1" text:name="multivariants_0_block_prc_compare_0_0_12">
            <text:p text:style-name="P8">€<text:span text:style-name="T1">16,99 EUR</text:span></text:p>
          </text:section>
          <text:section text:style-name="Sect1" text:name="multivariants_0_block_prc_unit_0_0_12">
            <text:p text:style-name="P2">€12,99 EUR</text:p>
          </text:section>
        </text:section>
      </text:section>
      <text:section text:style-name="Sect1" text:name="multivariants_0_block_option_0_0_14">
        <text:p text:style-name="P1"><draw:frame draw:style-name="fr1" draw:name="Obraz13" text:anchor-type="as-char" svg:width="5.821cm" svg:height="5.821cm" draw:z-index="11"><draw:image xlink:href="Pictures/10000000000000DC000000DC80623F22509162EA.jpg" xlink:type="simple" xlink:show="embed" xlink:actuate="onLoad" draw:mime-type="image/jpeg"/><svg:title>Ship to USA / PETG Cyan</svg:title></draw:frame></text:p>
        <text:p text:style-name="P4"><text:soft-page-break/>PETG Cyan</text:p>
        <text:section text:style-name="Sect1" text:name="multivariants_0_block_qtyh_0_0_14">
          <text:p text:style-name="P6">Quantity</text:p>
          <text:section text:style-name="Sect1" text:name="multivariants_0_block_qty_left_0_0_14">
            <text:p text:style-name="P7"/>
          </text:section>
          <text:section text:style-name="Sect1" text:name="multivariants_0_block_qty_right_0_0_14">
            <text:p text:style-name="P7"/>
          </text:section>
          <text:p text:style-name="P5">42 In stock</text:p>
        </text:section>
        <text:section text:style-name="Sect1" text:name="multivariants_0_block_prch_0_0_14">
          <text:p text:style-name="P3">Price</text:p>
          <text:section text:style-name="Sect1" text:name="multivariants_0_block_prc_compare_0_0_14">
            <text:p text:style-name="P8">€<text:span text:style-name="T1">16,99 EUR</text:span></text:p>
          </text:section>
          <text:section text:style-name="Sect1" text:name="multivariants_0_block_prc_unit_0_0_14">
            <text:p text:style-name="P2">€12,99 EUR</text:p>
          </text:section>
        </text:section>
      </text:section>
      <text:section text:style-name="Sect1" text:name="multivariants_0_block_option_0_0_16">
        <text:p text:style-name="P1"><draw:frame draw:style-name="fr1" draw:name="Obraz14" text:anchor-type="as-char" svg:width="5.821cm" svg:height="5.821cm" draw:z-index="12"><draw:image xlink:href="Pictures/10000000000000DC000000DC3D5D6265C38DE8B6.jpg" xlink:type="simple" xlink:show="embed" xlink:actuate="onLoad" draw:mime-type="image/jpeg"/><svg:title>Ship to USA / PETG Magenta</svg:title></draw:frame></text:p>
        <text:p text:style-name="P4">PETG Magenta</text:p>
        <text:section text:style-name="Sect1" text:name="multivariants_0_block_qtyh_0_0_16">
          <text:p text:style-name="P6">Quantity</text:p>
          <text:section text:style-name="Sect1" text:name="multivariants_0_block_qty_left_0_0_16">
            <text:p text:style-name="P7"/>
          </text:section>
          <text:section text:style-name="Sect1" text:name="multivariants_0_block_qty_right_0_0_16">
            <text:p text:style-name="P7"/>
          </text:section>
          <text:p text:style-name="P5">24 In stock</text:p>
        </text:section>
        <text:section text:style-name="Sect1" text:name="multivariants_0_block_prch_0_0_16">
          <text:p text:style-name="P3">Price</text:p>
          <text:section text:style-name="Sect1" text:name="multivariants_0_block_prc_compare_0_0_16">
            <text:p text:style-name="P8">€<text:span text:style-name="T1">16,99 EUR</text:span></text:p>
          </text:section>
          <text:section text:style-name="Sect1" text:name="multivariants_0_block_prc_unit_0_0_16">
            <text:p text:style-name="P2">€12,99 EUR</text:p>
          </text:section>
        </text:section>
      </text:section>
      <text:section text:style-name="Sect1" text:name="multivariants_0_block_option_0_0_17">
        <text:p text:style-name="P1"><draw:frame draw:style-name="fr1" draw:name="Obraz15" text:anchor-type="as-char" svg:width="5.821cm" svg:height="5.821cm" draw:z-index="13"><draw:image xlink:href="Pictures/10000000000000DC000000DC49D3437A18EC1F6B.jpg" xlink:type="simple" xlink:show="embed" xlink:actuate="onLoad" draw:mime-type="image/jpeg"/><svg:title>Ship to USA / PETG Beige(Skin)</svg:title></draw:frame></text:p>
        <text:p text:style-name="P4">PETG Beige(Skin)</text:p>
        <text:section text:style-name="Sect1" text:name="multivariants_0_block_qtyh_0_0_17">
          <text:p text:style-name="P6">Quantity</text:p>
          <text:section text:style-name="Sect1" text:name="multivariants_0_block_qty_left_0_0_17">
            <text:p text:style-name="P7"/>
          </text:section>
          <text:section text:style-name="Sect1" text:name="multivariants_0_block_qty_right_0_0_17">
            <text:p text:style-name="P7"/>
          </text:section>
          <text:p text:style-name="P5">16 In stock</text:p>
        </text:section>
        <text:section text:style-name="Sect1" text:name="multivariants_0_block_prch_0_0_17">
          <text:p text:style-name="P3">Price</text:p>
          <text:section text:style-name="Sect1" text:name="multivariants_0_block_prc_compare_0_0_17">
            <text:p text:style-name="P8">€<text:span text:style-name="T1">16,99 EUR</text:span></text:p>
          </text:section>
          <text:section text:style-name="Sect1" text:name="multivariants_0_block_prc_unit_0_0_17">
            <text:p text:style-name="P2">€12,99 EUR</text:p>
          </text:section>
        </text:section>
      </text:section>
      <text:section text:style-name="Sect1" text:name="multivariants_0_block_option_0_0_18">
        <text:p text:style-name="P1"><text:soft-page-break/><draw:frame draw:style-name="fr1" draw:name="Obraz16" text:anchor-type="as-char" svg:width="5.821cm" svg:height="5.821cm" draw:z-index="14"><draw:image xlink:href="Pictures/10000000000000DC000000DCE532D45468C2342F.jpg" xlink:type="simple" xlink:show="embed" xlink:actuate="onLoad" draw:mime-type="image/jpeg"/><svg:title>Ship to USA / PETG Oak(Wood)</svg:title></draw:frame></text:p>
        <text:p text:style-name="P4">PETG Oak(Wood)</text:p>
        <text:section text:style-name="Sect1" text:name="multivariants_0_block_qtyh_0_0_18">
          <text:p text:style-name="P6">Quantity</text:p>
          <text:section text:style-name="Sect1" text:name="multivariants_0_block_qty_left_0_0_18">
            <text:p text:style-name="P7"/>
          </text:section>
          <text:section text:style-name="Sect1" text:name="multivariants_0_block_qty_right_0_0_18">
            <text:p text:style-name="P7"/>
          </text:section>
          <text:p text:style-name="P5">4 In stock</text:p>
        </text:section>
        <text:section text:style-name="Sect1" text:name="multivariants_0_block_prch_0_0_18">
          <text:p text:style-name="P3">Price</text:p>
          <text:section text:style-name="Sect1" text:name="multivariants_0_block_prc_compare_0_0_18">
            <text:p text:style-name="P8">€<text:span text:style-name="T1">16,99 EUR</text:span></text:p>
          </text:section>
          <text:section text:style-name="Sect1" text:name="multivariants_0_block_prc_unit_0_0_18">
            <text:p text:style-name="P2">€12,99 EUR</text:p>
          </text:section>
        </text:section>
      </text:section>
      <text:section text:style-name="Sect1" text:name="multivariants_0_block_option_0_0_19">
        <text:p text:style-name="P1"><draw:frame draw:style-name="fr1" draw:name="Obraz17" text:anchor-type="as-char" svg:width="5.821cm" svg:height="5.821cm" draw:z-index="15"><draw:image xlink:href="Pictures/10000000000000DC000000DCA345574702864CC3.jpg" xlink:type="simple" xlink:show="embed" xlink:actuate="onLoad" draw:mime-type="image/jpeg"/><svg:title>Ship to USA / PETG Transparent Blue</svg:title></draw:frame></text:p>
        <text:p text:style-name="P4">PETG Transparent Blue</text:p>
        <text:section text:style-name="Sect1" text:name="multivariants_0_block_qtyh_0_0_19">
          <text:p text:style-name="P6">Quantity</text:p>
          <text:section text:style-name="Sect1" text:name="multivariants_0_block_qty_left_0_0_19">
            <text:p text:style-name="P7"/>
          </text:section>
          <text:section text:style-name="Sect1" text:name="multivariants_0_block_qty_right_0_0_19">
            <text:p text:style-name="P7"/>
          </text:section>
          <text:p text:style-name="P5">101 In stock</text:p>
        </text:section>
        <text:section text:style-name="Sect1" text:name="multivariants_0_block_prch_0_0_19">
          <text:p text:style-name="P3">Price</text:p>
          <text:section text:style-name="Sect1" text:name="multivariants_0_block_prc_compare_0_0_19">
            <text:p text:style-name="P8">€<text:span text:style-name="T1">16,99 EUR</text:span></text:p>
          </text:section>
          <text:section text:style-name="Sect1" text:name="multivariants_0_block_prc_unit_0_0_19">
            <text:p text:style-name="P2">€12,99 EUR</text:p>
          </text:section>
        </text:section>
      </text:section>
      <text:section text:style-name="Sect1" text:name="multivariants_0_block_option_0_0_20">
        <text:p text:style-name="P1"><draw:frame draw:style-name="fr1" draw:name="Obraz18" text:anchor-type="as-char" svg:width="5.821cm" svg:height="5.821cm" draw:z-index="16"><draw:image xlink:href="Pictures/10000000000000DC000000DC92A31E5EDB38F8FC.jpg" xlink:type="simple" xlink:show="embed" xlink:actuate="onLoad" draw:mime-type="image/jpeg"/><svg:title>Ship to USA / PETG Transparent Green</svg:title></draw:frame></text:p>
        <text:p text:style-name="P4"><text:soft-page-break/>PETG Transparent Green</text:p>
        <text:section text:style-name="Sect1" text:name="multivariants_0_block_qtyh_0_0_20">
          <text:p text:style-name="P6">Quantity</text:p>
          <text:section text:style-name="Sect1" text:name="multivariants_0_block_qty_left_0_0_20">
            <text:p text:style-name="P7"/>
          </text:section>
          <text:section text:style-name="Sect1" text:name="multivariants_0_block_qty_right_0_0_20">
            <text:p text:style-name="P7"/>
          </text:section>
          <text:p text:style-name="P5">117 In stock</text:p>
        </text:section>
        <text:section text:style-name="Sect1" text:name="multivariants_0_block_prch_0_0_20">
          <text:p text:style-name="P3">Price</text:p>
          <text:section text:style-name="Sect1" text:name="multivariants_0_block_prc_compare_0_0_20">
            <text:p text:style-name="P8">€<text:span text:style-name="T1">16,99 EUR</text:span></text:p>
          </text:section>
          <text:section text:style-name="Sect1" text:name="multivariants_0_block_prc_unit_0_0_20">
            <text:p text:style-name="P2">€12,99 EUR</text:p>
          </text:section>
        </text:section>
      </text:section>
      <text:section text:style-name="Sect1" text:name="multivariants_0_block_option_0_0_21">
        <text:p text:style-name="P1"><draw:frame draw:style-name="fr1" draw:name="Obraz19" text:anchor-type="as-char" svg:width="5.821cm" svg:height="5.821cm" draw:z-index="17"><draw:image xlink:href="Pictures/10000000000000DC000000DCF1B0F2C223FD8654.jpg" xlink:type="simple" xlink:show="embed" xlink:actuate="onLoad" draw:mime-type="image/jpeg"/><svg:title>Ship to USA / PETG Transparent Purple</svg:title></draw:frame></text:p>
        <text:p text:style-name="P4">PETG Transparent Purple</text:p>
        <text:section text:style-name="Sect1" text:name="multivariants_0_block_qtyh_0_0_21">
          <text:p text:style-name="P6">Quantity</text:p>
          <text:section text:style-name="Sect1" text:name="multivariants_0_block_qty_left_0_0_21">
            <text:p text:style-name="P7"/>
          </text:section>
          <text:section text:style-name="Sect1" text:name="multivariants_0_block_qty_right_0_0_21">
            <text:p text:style-name="P7"/>
          </text:section>
          <text:p text:style-name="P5">45 In stock</text:p>
        </text:section>
        <text:section text:style-name="Sect1" text:name="multivariants_0_block_prch_0_0_21">
          <text:p text:style-name="P3">Price</text:p>
          <text:section text:style-name="Sect1" text:name="multivariants_0_block_prc_compare_0_0_21">
            <text:p text:style-name="P8">€<text:span text:style-name="T1">16,99 EUR</text:span></text:p>
          </text:section>
          <text:section text:style-name="Sect1" text:name="multivariants_0_block_prc_unit_0_0_21">
            <text:p text:style-name="P2">€12,99 EUR</text:p>
          </text:section>
        </text:section>
      </text:section>
      <text:section text:style-name="Sect1" text:name="multivariants_0_block_option_0_0_22">
        <text:p text:style-name="P1"><draw:frame draw:style-name="fr1" draw:name="Obraz20" text:anchor-type="as-char" svg:width="5.821cm" svg:height="5.821cm" draw:z-index="18"><draw:image xlink:href="Pictures/10000000000000DC000000DC00C3D1792CC36ABD.jpg" xlink:type="simple" xlink:show="embed" xlink:actuate="onLoad" draw:mime-type="image/jpeg"/><svg:title>Ship to USA / PETG Transparent Red</svg:title></draw:frame></text:p>
        <text:p text:style-name="P4">PETG Transparent Red</text:p>
        <text:section text:style-name="Sect1" text:name="multivariants_0_block_qtyh_0_0_22">
          <text:p text:style-name="P6">Quantity</text:p>
          <text:section text:style-name="Sect1" text:name="multivariants_0_block_qty_left_0_0_22">
            <text:p text:style-name="P7"/>
          </text:section>
          <text:section text:style-name="Sect1" text:name="multivariants_0_block_qty_right_0_0_22">
            <text:p text:style-name="P7"/>
          </text:section>
          <text:p text:style-name="P5">81 In stock</text:p>
        </text:section>
        <text:section text:style-name="Sect1" text:name="multivariants_0_block_prch_0_0_22">
          <text:p text:style-name="P3">Price</text:p>
          <text:section text:style-name="Sect1" text:name="multivariants_0_block_prc_compare_0_0_22">
            <text:p text:style-name="P8">€<text:span text:style-name="T1">16,99 EUR</text:span></text:p>
          </text:section>
          <text:section text:style-name="Sect1" text:name="multivariants_0_block_prc_unit_0_0_22">
            <text:p text:style-name="P2">€12,99 EUR</text:p>
          </text:section>
        </text:section>
      </text:section>
      <text:section text:style-name="Sect1" text:name="multivariants_0_block_option_0_0_23">
        <text:p text:style-name="P1"><text:soft-page-break/><draw:frame draw:style-name="fr1" draw:name="Obraz21" text:anchor-type="as-char" svg:width="5.821cm" svg:height="5.821cm" draw:z-index="19"><draw:image xlink:href="Pictures/10000000000000DC000000DC4688BD7F250F258B.jpg" xlink:type="simple" xlink:show="embed" xlink:actuate="onLoad" draw:mime-type="image/jpeg"/><svg:title>Ship to USA / PETG Transparent Orange</svg:title></draw:frame></text:p>
        <text:p text:style-name="P4">PETG Transparent Orange</text:p>
        <text:section text:style-name="Sect1" text:name="multivariants_0_block_qtyh_0_0_23">
          <text:p text:style-name="P6">Quantity</text:p>
          <text:section text:style-name="Sect1" text:name="multivariants_0_block_qty_left_0_0_23">
            <text:p text:style-name="P7"/>
          </text:section>
          <text:section text:style-name="Sect1" text:name="multivariants_0_block_qty_right_0_0_23">
            <text:p text:style-name="P7"/>
          </text:section>
          <text:p text:style-name="P5">109 In stock</text:p>
        </text:section>
        <text:section text:style-name="Sect1" text:name="multivariants_0_block_prch_0_0_23">
          <text:p text:style-name="P3">Price</text:p>
          <text:section text:style-name="Sect1" text:name="multivariants_0_block_prc_compare_0_0_23">
            <text:p text:style-name="P8">€<text:span text:style-name="T1">16,99 EUR</text:span></text:p>
          </text:section>
          <text:section text:style-name="Sect1" text:name="multivariants_0_block_prc_unit_0_0_23">
            <text:p text:style-name="P2">€12,99 EUR</text:p>
          </text:section>
        </text:section>
      </text:section>
      <text:section text:style-name="Sect1" text:name="multivariants_0_block_option_0_0_25">
        <text:p text:style-name="P1"><draw:frame draw:style-name="fr1" draw:name="Obraz22" text:anchor-type="as-char" svg:width="5.821cm" svg:height="5.821cm" draw:z-index="20"><draw:image xlink:href="Pictures/10000000000000DC000000DC4F21A4D0B04F715C.jpg" xlink:type="simple" xlink:show="embed" xlink:actuate="onLoad" draw:mime-type="image/jpeg"/><svg:title>Ship to USA / PETG Sky Blue</svg:title></draw:frame></text:p>
        <text:p text:style-name="P4">PETG Sky Blue</text:p>
        <text:section text:style-name="Sect1" text:name="multivariants_0_block_qtyh_0_0_25">
          <text:p text:style-name="P6">Quantity</text:p>
          <text:section text:style-name="Sect1" text:name="multivariants_0_block_qty_left_0_0_25">
            <text:p text:style-name="P7"/>
          </text:section>
          <text:section text:style-name="Sect1" text:name="multivariants_0_block_qty_right_0_0_25">
            <text:p text:style-name="P7"/>
          </text:section>
          <text:p text:style-name="P5">68 In stock</text:p>
        </text:section>
        <text:section text:style-name="Sect1" text:name="multivariants_0_block_prch_0_0_25">
          <text:p text:style-name="P3">Price</text:p>
          <text:section text:style-name="Sect1" text:name="multivariants_0_block_prc_compare_0_0_25">
            <text:p text:style-name="P8">€<text:span text:style-name="T1">16,99 EUR</text:span></text:p>
          </text:section>
          <text:section text:style-name="Sect1" text:name="multivariants_0_block_prc_unit_0_0_25">
            <text:p text:style-name="P2">€12,99 EUR</text:p>
          </text:section>
        </text:section>
      </text:section>
      <text:section text:style-name="Sect1" text:name="multivariants_0_block_option_0_0_26">
        <text:p text:style-name="P1"><draw:frame draw:style-name="fr1" draw:name="Obraz23" text:anchor-type="as-char" svg:width="5.821cm" svg:height="5.821cm" draw:z-index="21"><draw:image xlink:href="Pictures/10000000000000DC000000DC180FE3D1B16E2862.jpg" xlink:type="simple" xlink:show="embed" xlink:actuate="onLoad" draw:mime-type="image/jpeg"/><svg:title>Ship to USA / PETG Chocolate</svg:title></draw:frame></text:p>
        <text:p text:style-name="P4"><text:soft-page-break/>PETG Chocolate</text:p>
        <text:section text:style-name="Sect1" text:name="multivariants_0_block_qtyh_0_0_26">
          <text:p text:style-name="P6">Quantity</text:p>
          <text:section text:style-name="Sect1" text:name="multivariants_0_block_qty_left_0_0_26">
            <text:p text:style-name="P7"/>
          </text:section>
          <text:section text:style-name="Sect1" text:name="multivariants_0_block_qty_right_0_0_26">
            <text:p text:style-name="P7"/>
          </text:section>
          <text:p text:style-name="P5">82 In stock</text:p>
        </text:section>
        <text:section text:style-name="Sect1" text:name="multivariants_0_block_prch_0_0_26">
          <text:p text:style-name="P3">Price</text:p>
          <text:section text:style-name="Sect1" text:name="multivariants_0_block_prc_compare_0_0_26">
            <text:p text:style-name="P8">€<text:span text:style-name="T1">16,99 EUR</text:span></text:p>
          </text:section>
          <text:section text:style-name="Sect1" text:name="multivariants_0_block_prc_unit_0_0_26">
            <text:p text:style-name="P2">€12,99 EUR</text:p>
          </text:section>
        </text:section>
      </text:section>
      <text:section text:style-name="Sect1" text:name="multivariants_0_block_option_0_0_27">
        <text:p text:style-name="P1"><draw:frame draw:style-name="fr1" draw:name="Obraz24" text:anchor-type="as-char" svg:width="5.821cm" svg:height="5.821cm" draw:z-index="22"><draw:image xlink:href="Pictures/10000000000000DC000000DC6A2B1337E3D70623.jpg" xlink:type="simple" xlink:show="embed" xlink:actuate="onLoad" draw:mime-type="image/jpeg"/><svg:title>Ship to USA / PETG Cherry Red</svg:title></draw:frame></text:p>
        <text:p text:style-name="P4">PETG Cherry Red</text:p>
        <text:section text:style-name="Sect1" text:name="multivariants_0_block_qtyh_0_0_27">
          <text:p text:style-name="P6">Quantity</text:p>
          <text:section text:style-name="Sect1" text:name="multivariants_0_block_qty_left_0_0_27">
            <text:p text:style-name="P7"/>
          </text:section>
          <text:section text:style-name="Sect1" text:name="multivariants_0_block_qty_right_0_0_27">
            <text:p text:style-name="P7"/>
          </text:section>
          <text:p text:style-name="P5">56 In stock</text:p>
        </text:section>
        <text:section text:style-name="Sect1" text:name="multivariants_0_block_prch_0_0_27">
          <text:p text:style-name="P3">Price</text:p>
          <text:section text:style-name="Sect1" text:name="multivariants_0_block_prc_compare_0_0_27">
            <text:p text:style-name="P8">€<text:span text:style-name="T1">16,99 EUR</text:span></text:p>
          </text:section>
          <text:section text:style-name="Sect1" text:name="multivariants_0_block_prc_unit_0_0_27">
            <text:p text:style-name="P2">€12,99 EUR</text:p>
          </text:section>
        </text:section>
      </text:section>
      <text:section text:style-name="Sect1" text:name="multivariants_0_block_option_0_0_28">
        <text:p text:style-name="P1"><draw:frame draw:style-name="fr1" draw:name="Obraz25" text:anchor-type="as-char" svg:width="5.821cm" svg:height="5.821cm" draw:z-index="23"><draw:image xlink:href="Pictures/10000000000000DC000000DC4CFBD53C7914AB81.jpg" xlink:type="simple" xlink:show="embed" xlink:actuate="onLoad" draw:mime-type="image/jpeg"/><svg:title>Ship to USA / PETG Lemon Yellow</svg:title></draw:frame></text:p>
        <text:p text:style-name="P4">PETG Lemon Yellow</text:p>
        <text:section text:style-name="Sect1" text:name="multivariants_0_block_qtyh_0_0_28">
          <text:p text:style-name="P6">Quantity</text:p>
          <text:section text:style-name="Sect1" text:name="multivariants_0_block_qty_left_0_0_28">
            <text:p text:style-name="P7"/>
          </text:section>
          <text:section text:style-name="Sect1" text:name="multivariants_0_block_qty_right_0_0_28">
            <text:p text:style-name="P7"/>
          </text:section>
          <text:p text:style-name="P5">134 In stock</text:p>
        </text:section>
        <text:section text:style-name="Sect1" text:name="multivariants_0_block_prch_0_0_28">
          <text:p text:style-name="P3">Price</text:p>
          <text:section text:style-name="Sect1" text:name="multivariants_0_block_prc_compare_0_0_28">
            <text:p text:style-name="P8">€<text:span text:style-name="T1">16,99 EUR</text:span></text:p>
          </text:section>
          <text:section text:style-name="Sect1" text:name="multivariants_0_block_prc_unit_0_0_28">
            <text:p text:style-name="P2">€12,99 EUR</text:p>
          </text:section>
        </text:section>
      </text:section>
      <text:section text:style-name="Sect1" text:name="multivariants_0_block_option_0_0_29">
        <text:p text:style-name="P1"><text:soft-page-break/><draw:frame draw:style-name="fr1" draw:name="Obraz26" text:anchor-type="as-char" svg:width="5.821cm" svg:height="5.821cm" draw:z-index="24"><draw:image xlink:href="Pictures/10000000000000DC000000DCCFEA3A22BA0DECD4.jpg" xlink:type="simple" xlink:show="embed" xlink:actuate="onLoad" draw:mime-type="image/jpeg"/><svg:title>Ship to USA / PETG Mint Green</svg:title></draw:frame></text:p>
        <text:p text:style-name="P4">PETG Mint Green</text:p>
        <text:section text:style-name="Sect1" text:name="multivariants_0_block_qtyh_0_0_29">
          <text:p text:style-name="P6">Quantity</text:p>
          <text:section text:style-name="Sect1" text:name="multivariants_0_block_qty_left_0_0_29">
            <text:p text:style-name="P7"/>
          </text:section>
          <text:section text:style-name="Sect1" text:name="multivariants_0_block_qty_right_0_0_29">
            <text:p text:style-name="P7"/>
          </text:section>
          <text:p text:style-name="P5">26 In stock</text:p>
        </text:section>
        <text:section text:style-name="Sect1" text:name="multivariants_0_block_prch_0_0_29">
          <text:p text:style-name="P3">Price</text:p>
          <text:section text:style-name="Sect1" text:name="multivariants_0_block_prc_compare_0_0_29">
            <text:p text:style-name="P8">€<text:span text:style-name="T1">16,99 EUR</text:span></text:p>
          </text:section>
          <text:section text:style-name="Sect1" text:name="multivariants_0_block_prc_unit_0_0_29">
            <text:p text:style-name="P2">€12,99 EUR</text:p>
          </text:section>
        </text:section>
      </text:section>
      <text:section text:style-name="Sect1" text:name="multivariants_0_block_option_0_0_30">
        <text:p text:style-name="P1"><draw:frame draw:style-name="fr1" draw:name="Obraz27" text:anchor-type="as-char" svg:width="5.821cm" svg:height="5.821cm" draw:z-index="25"><draw:image xlink:href="Pictures/10000000000000DC000000DC2597A30F7CEC1078.jpg" xlink:type="simple" xlink:show="embed" xlink:actuate="onLoad" draw:mime-type="image/jpeg"/><svg:title>Ship to USA / PETG Oliver Green</svg:title></draw:frame></text:p>
        <text:p text:style-name="P4">PETG Oliver Green</text:p>
        <text:section text:style-name="Sect1" text:name="multivariants_0_block_qtyh_0_0_30">
          <text:p text:style-name="P6">Quantity</text:p>
          <text:section text:style-name="Sect1" text:name="multivariants_0_block_qty_left_0_0_30">
            <text:p text:style-name="P7"/>
          </text:section>
          <text:section text:style-name="Sect1" text:name="multivariants_0_block_qty_right_0_0_30">
            <text:p text:style-name="P7"/>
          </text:section>
          <text:p text:style-name="P5">72 In stock</text:p>
        </text:section>
        <text:section text:style-name="Sect1" text:name="multivariants_0_block_prch_0_0_30">
          <text:p text:style-name="P3">Price</text:p>
          <text:section text:style-name="Sect1" text:name="multivariants_0_block_prc_compare_0_0_30">
            <text:p text:style-name="P8">€<text:span text:style-name="T1">16,99 EUR</text:span></text:p>
          </text:section>
          <text:section text:style-name="Sect1" text:name="multivariants_0_block_prc_unit_0_0_30">
            <text:p text:style-name="P2">€12,99 EUR</text:p>
          </text:section>
        </text:section>
      </text:section>
      <text:section text:style-name="Sect1" text:name="multivariants_0_block_option_0_0_31">
        <text:p text:style-name="P1"><draw:frame draw:style-name="fr1" draw:name="Obraz28" text:anchor-type="as-char" svg:width="5.821cm" svg:height="5.821cm" draw:z-index="26"><draw:image xlink:href="Pictures/10000000000000DC000000DC9AC1E00D598F83F1.jpg" xlink:type="simple" xlink:show="embed" xlink:actuate="onLoad" draw:mime-type="image/jpeg"/><svg:title>Ship to USA / PETG Transparent Yellow</svg:title></draw:frame></text:p>
        <text:p text:style-name="P4"><text:soft-page-break/>PETG Transparent Yellow</text:p>
        <text:section text:style-name="Sect1" text:name="multivariants_0_block_qtyh_0_0_31">
          <text:p text:style-name="P6">Quantity</text:p>
          <text:section text:style-name="Sect1" text:name="multivariants_0_block_qty_left_0_0_31">
            <text:p text:style-name="P7"/>
          </text:section>
          <text:section text:style-name="Sect1" text:name="multivariants_0_block_qty_right_0_0_31">
            <text:p text:style-name="P7"/>
          </text:section>
          <text:p text:style-name="P5">90 In stock</text:p>
        </text:section>
        <text:section text:style-name="Sect1" text:name="multivariants_0_block_prch_0_0_31">
          <text:p text:style-name="P3">Price</text:p>
          <text:section text:style-name="Sect1" text:name="multivariants_0_block_prc_compare_0_0_31">
            <text:p text:style-name="P8">€<text:span text:style-name="T1">16,99 EUR</text:span></text:p>
          </text:section>
          <text:section text:style-name="Sect1" text:name="multivariants_0_block_prc_unit_0_0_31">
            <text:p text:style-name="P2">€12,99 EUR</text:p>
          </text:section>
        </text:section>
      </text:section>
      <text:section text:style-name="Sect1" text:name="multivariants_0_block_option_0_0_32">
        <text:p text:style-name="P1"><draw:frame draw:style-name="fr1" draw:name="Obraz29" text:anchor-type="as-char" svg:width="5.821cm" svg:height="5.821cm" draw:z-index="27"><draw:image xlink:href="Pictures/10000000000000DC000000DCFEE807307C1397E0.jpg" xlink:type="simple" xlink:show="embed" xlink:actuate="onLoad" draw:mime-type="image/jpeg"/><svg:title>Ship to USA / PETG Sunny Orange</svg:title></draw:frame></text:p>
        <text:p text:style-name="P4">PETG Sunny Orange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3T18:36:37.021000000</meta:creation-date>
    <dc:date>2026-06-13T18:37:38.632000000</dc:date>
    <meta:editing-duration>PT1M2S</meta:editing-duration>
    <meta:editing-cycles>1</meta:editing-cycles>
    <meta:document-statistic meta:table-count="0" meta:image-count="29" meta:object-count="0" meta:page-count="12" meta:paragraph-count="198" meta:word-count="327" meta:character-count="1713" meta:non-whitespace-character-count="1555"/>
    <meta:generator>LibreOffice/7.3.4.2$Windows_X86_64 LibreOffice_project/728fec16bd5f605073805c3c9e7c4212a0120dc5</meta:generator>
  </office:meta>
</office:document-meta>
</file>